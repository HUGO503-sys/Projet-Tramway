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D0000008A4F7AE9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officeooo:rsid="0007a8d6" officeooo:paragraph-rsid="0007a8d6" style:font-size-asian="13.1000003814697pt" style:font-size-complex="15pt"/>
    </style:style>
    <style:style style:name="P2" style:family="paragraph" style:parent-style-name="Standard">
      <style:text-properties fo:font-size="15pt" officeooo:rsid="000a30f7" officeooo:paragraph-rsid="000a30f7" style:font-size-asian="13.1000003814697pt" style:font-size-complex="15pt"/>
    </style:style>
    <style:style style:name="P3" style:family="paragraph" style:parent-style-name="Standard">
      <style:text-properties officeooo:paragraph-rsid="000a541a"/>
    </style:style>
    <style:style style:name="T1" style:family="text">
      <style:text-properties fo:font-size="18pt" style:font-size-asian="18pt" style:font-size-complex="18pt"/>
    </style:style>
    <style:style style:name="T2" style:family="text">
      <style:text-properties fo:font-size="18pt" officeooo:rsid="0008868b" style:font-size-asian="18pt" style:font-size-complex="18pt"/>
    </style:style>
    <style:style style:name="T3" style:family="text">
      <style:text-properties fo:font-size="18pt" officeooo:rsid="000a30f7" style:font-size-asian="18pt" style:font-size-complex="18pt"/>
    </style:style>
    <style:style style:name="T4" style:family="text">
      <style:text-properties fo:font-size="18pt" officeooo:rsid="000a541a" style:font-size-asian="18pt" style:font-size-complex="18pt"/>
    </style:style>
    <style:style style:name="T5" style:family="text">
      <style:text-properties fo:font-size="18pt" officeooo:rsid="000be5e3"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érer le stationnement:</text:span></text:p>
      <text:p text:style-name="P1"><text:span text:style-name="T1"/></text:p>
      <text:p text:style-name="P1"><text:span text:style-name="T1">- solution 1: parking payant avec barrière, a l’entrée un </text:span><text:span text:style-name="T2">comptoir qui une fois le parking payer donne un ticket pour sortir et le barrière s’ouvre. </text:span><text:span text:style-name="T4">Il y aura des capteurs sur les places de parking pour indiqué le nombre de places restante et si le parking est plein le payement est refusé et la barrière ne s’ouvre pas.</text:span><text:span text:style-name="T5">Et il y aura des places pour les voitures electrique.</text:span></text:p>
      <text:p text:style-name="P1"><text:span text:style-name="T2"/></text:p>
      <text:p text:style-name="P1"><text:span text:style-name="T2"/></text:p>
      <text:p text:style-name="P1"><text:span text:style-name="T2"/></text:p>
      <text:p text:style-name="P1"><draw:frame draw:style-name="fr1" draw:name="Image1" text:anchor-type="char" svg:x="-0.938cm" svg:y="0.016cm" svg:width="10.485cm" svg:height="3.963cm" draw:z-index="0"><draw:image xlink:href="Pictures/100000000000016D0000008A4F7AE9BC.png" xlink:type="simple" xlink:show="embed" xlink:actuate="onLoad" draw:mime-type="image/png"/></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2"><text:span text:style-name="T2">g</text:span><text:span text:style-name="T1">érer la barrière de sécurité: </text:span></text:p>
      <text:p text:style-name="P2"><text:span text:style-name="T1"/></text:p>
      <text:p text:style-name="P3"><text:span text:style-name="T3">-solution 1: quand le </text:span><text:span text:style-name="T1">Tramway </text:span><text:span text:style-name="T3">arrive a 500m de l’intersection le feu deviens rouge et 3sec après les barrière ce ferme et elle vous </text:span><text:span text:style-name="T4">s’ouvrir que le <text:s/>Tramway va etre a 50m après l’intersection</text:span></text:p>
      <text:p text:style-name="P2"><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13T10:56:20.006000000</meta:creation-date>
    <dc:date>2026-03-13T12:55:13.019000000</dc:date>
    <meta:editing-duration>PT36M19S</meta:editing-duration>
    <meta:editing-cycles>1</meta:editing-cycles>
    <meta:document-statistic meta:table-count="0" meta:image-count="1" meta:object-count="0" meta:page-count="1" meta:paragraph-count="4" meta:word-count="110" meta:character-count="618" meta:non-whitespace-character-count="510"/>
    <meta:generator>LibreOffice/24.2.7.2$Windows_X86_64 LibreOffice_project/ee3885777aa7032db5a9b65deec9457448a91162</meta:generator>
  </office:meta>
</office:document-meta>
</file>